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F4C4454CB918A5A3C8.png" manifest:media-type="image/png"/>
  <manifest:file-entry manifest:full-path="Pictures/10000201000001C70000015252CD3CEB618A673B.png" manifest:media-type="image/png"/>
  <manifest:file-entry manifest:full-path="Pictures/1000000000000200000002009FD4E741CB23A672.jpg" manifest:media-type="image/jpeg"/>
  <manifest:file-entry manifest:full-path="Pictures/1000020100000078000000786ACA4C02B9501C96.png" manifest:media-type="image/png"/>
  <manifest:file-entry manifest:full-path="Pictures/100002010000126400000770FC23E6BC0AC12165.png" manifest:media-type="image/png"/>
  <manifest:file-entry manifest:full-path="Pictures/10000201000000F0000000F0D525F7BB8518D329.png" manifest:media-type="image/png"/>
  <manifest:file-entry manifest:full-path="Pictures/100002010000006000000060DB73C5E596D2A4BF.png" manifest:media-type="image/png"/>
  <manifest:file-entry manifest:full-path="Pictures/100002010000034300000343202FDEFA4E699510.png" manifest:media-type="image/png"/>
  <manifest:file-entry manifest:full-path="Pictures/10000000000000C8000000C8962FD9C3CEF988CC.png" manifest:media-type="image/png"/>
  <manifest:file-entry manifest:full-path="Pictures/10000201000004000000019D3D617E1A0D446D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.644cm" fo:min-width="18.214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23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>
      <style:graphic-properties style:protect="size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44cm" fo:min-width="17.03cm" fo:padding-top="0.254cm" fo:padding-bottom="0.254cm" fo:padding-left="0.254cm" fo:padding-right="0.254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44cm" fo:min-width="17.03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844cm" fo:min-width="14.222cm" fo:padding-top="0.254cm" fo:padding-bottom="0.254cm" fo:padding-left="0.254cm" fo:padding-right="0.254cm" fo:wrap-option="wrap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1.93cm" fo:min-width="19.883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6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1.93cm" fo:min-width="19.883cm" fo:padding-top="0.254cm" fo:padding-bottom="0.254cm" fo:padding-left="0.254cm" fo:padding-right="0.254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1.93cm" fo:min-width="20.483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44cm" fo:min-width="17.03cm" fo:padding-top="0.254cm" fo:padding-bottom="0.254cm" fo:padding-left="0.254cm" fo:padding-right="0.254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44cm" fo:min-width="17.03cm" fo:padding-top="0.254cm" fo:padding-bottom="0.254cm" fo:padding-left="0.254cm" fo:padding-right="0.254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44cm" fo:min-width="17.03cm" fo:padding-top="0.254cm" fo:padding-bottom="0.254cm" fo:padding-left="0.254cm" fo:padding-right="0.254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11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5" draw:style-name="gr1" draw:text-style-name="P1" draw:layer="layout" svg:width="4.471cm" svg:height="4.471cm" svg:x="1.207cm" svg:y="1.238cm">
          <draw:image xlink:href="Pictures/10000000000000C8000000C8962FD9C3CEF988CC.png" xlink:type="simple" xlink:show="embed" xlink:actuate="onLoad">
            <text:p/>
          </draw:image>
        </draw:frame>
        <draw:custom-shape draw:name="Shape 56" draw:style-name="gr2" draw:text-style-name="P3" draw:layer="layout" svg:width="18.721cm" svg:height="1.151cm" svg:x="6.479cm" svg:y="3.13cm">
          <text:p text:style-name="P2"><text:span text:style-name="T1">#9 WebRTC intro and worksh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3" draw:text-style-name="P4" draw:layer="layout" svg:width="17.537cm" svg:height="1.151cm" svg:x="6.479cm" svg:y="4.458cm">
          <text:p text:style-name="P2"><text:span text:style-name="T2">12th </text:span><text:span text:style-name="T2">July </text:span><text:span text:style-name="T2">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4.48cm" svg:height="4.48cm" svg:x="1.198cm" svg:y="1.229cm">
          <draw:image xlink:href="Pictures/10000201000000F0000000F0D525F7BB8518D329.png" xlink:type="simple" xlink:show="embed" xlink:actuate="onLoad">
            <text:p/>
          </draw:image>
        </draw:frame>
        <draw:frame draw:style-name="gr5" draw:text-style-name="P7" draw:layer="layout" svg:width="19.6cm" svg:height="6.482cm" svg:x="2.4cm" svg:y="7cm">
          <draw:text-box>
            <text:p>Twitter: @nottsjs #nottsjs #JavaScript</text:p>
            <text:p/>
            <text:p>Gitter: nottsjs/discuss</text:p>
            <text:p/>
            <text:p>WiFi: JH Guest Network / weloveguests112015</text:p>
            <text:p/>
            <text:p>Organised by:</text:p>
            <text:p text:style-name="P6"><text:span text:style-name="T3">Ian Crowther, Graham </text:span><text:span text:style-name="T3">Smith, Joe McKie, Chris </text:span><text:span text:style-name="T3">Kemp, Greg Bowler, </text:span><text:span text:style-name="T3">Jonathan Kingston and </text:span><text:span text:style-name="T3">David Wood</text:span></text:p>
          </draw:text-box>
        </draw:frame>
        <draw:frame draw:style-name="gr6" draw:text-style-name="P7" draw:layer="layout" svg:width="4.4cm" svg:height="0.962cm" svg:x="21.6cm" svg:y="0.8cm">
          <draw:text-box>
            <text:p>nottsjs.org</text:p>
          </draw:text-box>
        </draw:frame>
        <presentation:notes draw:style-name="dp2">
          <draw:page-thumbnail draw:name="Shape 51" draw:style-name="gr7" draw:layer="layout" svg:width="16.933cm" svg:height="9.524cm" svg:x="1.059cm" svg:y="1.905cm" draw:page-number="1" presentation:class="page"/>
          <draw:frame draw:name="Shape 52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frame draw:name="Shape 55" draw:style-name="gr1" draw:text-style-name="P1" draw:layer="layout" svg:width="4.471cm" svg:height="4.471cm" svg:x="1.207cm" svg:y="1.238cm">
          <draw:image xlink:href="Pictures/10000000000000C8000000C8962FD9C3CEF988CC.png" xlink:type="simple" xlink:show="embed" xlink:actuate="onLoad">
            <text:p/>
          </draw:image>
        </draw:frame>
        <draw:custom-shape draw:name="Shape 56" draw:style-name="gr8" draw:text-style-name="P3" draw:layer="layout" svg:width="17.537cm" svg:height="1.151cm" svg:x="6.479cm" svg:y="3.13cm">
          <text:p text:style-name="P2"><text:span text:style-name="T1">Inf</text:span><text:span text:style-name="T1">or</text:span><text:span text:style-name="T1">ma</text:span><text:span text:style-name="T1">tio</text:span><text:span text:style-name="T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9" draw:text-style-name="P3" draw:layer="layout" svg:width="17.537cm" svg:height="1.151cm" svg:x="6.479cm" svg:y="4.4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4.48cm" svg:height="4.48cm" svg:x="1.198cm" svg:y="1.229cm">
          <draw:image xlink:href="Pictures/10000201000000F0000000F0D525F7BB8518D329.png" xlink:type="simple" xlink:show="embed" xlink:actuate="onLoad">
            <text:p/>
          </draw:image>
        </draw:frame>
        <draw:frame draw:style-name="gr5" draw:text-style-name="P7" draw:layer="layout" svg:width="19.6cm" svg:height="6.482cm" svg:x="2.4cm" svg:y="7cm">
          <draw:text-box>
            <text:p><text:span text:style-name="T3">- Fire </text:span><text:span text:style-name="T3">exits</text:span></text:p>
            <text:p><text:span text:style-name="T3"/></text:p>
            <text:p><text:span text:style-name="T3">- Food </text:span><text:span text:style-name="T3">&amp; </text:span><text:span text:style-name="T3">Drinks</text:span></text:p>
            <text:p><text:span text:style-name="T3"/></text:p>
            <text:p><text:span text:style-name="T3">- </text:span><text:span text:style-name="T3">Toilets</text:span></text:p>
            <text:p><text:span text:style-name="T3"/></text:p>
            <text:p><text:span text:style-name="T3">- </text:span><text:span text:style-name="T3">Announ</text:span><text:span text:style-name="T3">cement</text:span><text:span text:style-name="T3">s</text:span></text:p>
            <text:p><text:span text:style-name="T3"/></text:p>
          </draw:text-box>
        </draw:frame>
        <draw:frame draw:style-name="gr5" draw:text-style-name="P7" draw:layer="layout" svg:width="13.6cm" svg:height="6.482cm" svg:x="11.2cm" svg:y="6.218cm">
          <draw:text-box>
            <text:p>Twitter: @nottsjs #nottsjs #JavaScript</text:p>
            <text:p/>
            <text:p>Gitter: nottsjs/discuss</text:p>
            <text:p/>
            <text:p>WiFi: JH Guest Network / weloveguests112015</text:p>
          </draw:text-box>
        </draw:frame>
        <draw:frame draw:style-name="gr6" draw:text-style-name="P7" draw:layer="layout" svg:width="4.4cm" svg:height="0.962cm" svg:x="21.6cm" svg:y="0.8cm">
          <draw:text-box>
            <text:p>nottsjs.org</text:p>
          </draw:text-box>
        </draw:frame>
        <presentation:notes draw:style-name="dp2">
          <draw:page-thumbnail draw:name="Shape 51" draw:style-name="gr7" draw:layer="layout" svg:width="16.933cm" svg:height="9.524cm" svg:x="1.059cm" svg:y="1.905cm" draw:page-number="2" presentation:class="page"/>
          <draw:frame draw:name="Shape 52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1T0">
        <office:forms form:automatic-focus="false" form:apply-design-mode="false"/>
        <draw:frame draw:name="Shape 62" draw:style-name="gr1" draw:text-style-name="P1" draw:layer="layout" svg:width="2.437cm" svg:height="2.437cm" svg:x="1.207cm" svg:y="1.238cm">
          <draw:image xlink:href="Pictures/10000000000000C8000000C8962FD9C3CEF988CC.png" xlink:type="simple" xlink:show="embed" xlink:actuate="onLoad">
            <text:p/>
          </draw:image>
        </draw:frame>
        <draw:custom-shape draw:name="Shape 63" draw:style-name="gr10" draw:text-style-name="P4" draw:layer="layout" svg:width="8.332cm" svg:height="2.437cm" svg:x="3.81cm" svg:y="1.238cm">
          <text:p text:style-name="P2"><text:span text:style-name="T1">Sp</text:span><text:span text:style-name="T1">on</text:span><text:span text:style-name="T1">sor</text:span><text:span text:style-name="T1">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64">
          <draw:frame draw:name="Shape 65" draw:style-name="gr1" draw:text-style-name="P1" draw:layer="layout" svg:width="6.586cm" svg:height="6.586cm" svg:x="3.4cm" svg:y="5.8cm">
            <draw:image xlink:href="Pictures/100002010000034300000343202FDEFA4E699510.png" xlink:type="simple" xlink:show="embed" xlink:actuate="onLoad">
              <text:p/>
            </draw:image>
          </draw:frame>
          <draw:frame draw:name="Shape 66" draw:style-name="gr1" draw:text-style-name="P1" draw:layer="layout" svg:width="8.1cm" svg:height="3.266cm" svg:x="12.093cm" svg:y="7.46cm">
            <draw:image xlink:href="Pictures/10000201000004000000019D3D617E1A0D446D4E.png" xlink:type="simple" xlink:show="embed" xlink:actuate="onLoad">
              <text:p/>
            </draw:image>
          </draw:frame>
        </draw:g>
        <draw:frame draw:style-name="gr4" draw:text-style-name="P5" draw:layer="layout" svg:width="15.799cm" svg:height="6.388cm" svg:x="9.401cm" svg:y="1.2cm">
          <draw:image xlink:href="Pictures/100002010000126400000770FC23E6BC0AC12165.png" xlink:type="simple" xlink:show="embed" xlink:actuate="onLoad">
            <text:p/>
          </draw:image>
        </draw:frame>
        <draw:frame draw:style-name="gr4" draw:text-style-name="P5" draw:layer="layout" svg:width="2.4cm" svg:height="2.4cm" svg:x="1.207cm" svg:y="1.238cm">
          <draw:image xlink:href="Pictures/10000201000000F0000000F0D525F7BB8518D329.png" xlink:type="simple" xlink:show="embed" xlink:actuate="onLoad">
            <text:p/>
          </draw:image>
        </draw:frame>
        <draw:frame draw:style-name="gr6" draw:text-style-name="P7" draw:layer="layout" svg:width="4.4cm" svg:height="0.962cm" svg:x="21.6cm" svg:y="0.8cm">
          <draw:text-box>
            <text:p>nottsjs.org</text:p>
          </draw:text-box>
        </draw:frame>
        <draw:frame draw:style-name="gr6" draw:text-style-name="P7" draw:layer="layout" svg:width="4.4cm" svg:height="0.962cm" svg:x="21.6cm" svg:y="0.8cm">
          <draw:text-box>
            <text:p>nottsjs.org</text:p>
          </draw:text-box>
        </draw:frame>
        <draw:frame draw:style-name="gr11" draw:text-style-name="P7" draw:layer="layout" svg:width="19.4cm" svg:height="2.384cm" svg:x="0cm" svg:y="12cm">
          <draw:text-box>
            <text:p>Twitter: @nottsjs #nottsjs #JavaScript</text:p>
            <text:p>Gitter: nottsjs/discuss</text:p>
            <text:p>WiFi: JH Guest Network / weloveguests112015</text:p>
          </draw:text-box>
        </draw:frame>
        <presentation:notes draw:style-name="dp2">
          <draw:page-thumbnail draw:name="Shape 59" draw:style-name="gr7" draw:layer="layout" svg:width="16.932cm" svg:height="9.524cm" svg:x="1.059cm" svg:y="1.905cm" draw:page-number="3" presentation:class="page"/>
          <draw:frame draw:name="Shape 60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" presentation:presentation-page-layout-name="AL1T0">
        <office:forms form:automatic-focus="false" form:apply-design-mode="false"/>
        <draw:frame draw:name="Shape 71" draw:style-name="gr1" draw:text-style-name="P1" draw:layer="layout" svg:width="2.437cm" svg:height="2.437cm" svg:x="1.207cm" svg:y="1.238cm">
          <draw:image xlink:href="Pictures/10000000000000C8000000C8962FD9C3CEF988CC.png" xlink:type="simple" xlink:show="embed" xlink:actuate="onLoad">
            <text:p/>
          </draw:image>
        </draw:frame>
        <draw:custom-shape draw:name="Shape 72" draw:style-name="gr10" draw:text-style-name="P4" draw:layer="layout" svg:width="8.332cm" svg:height="2.437cm" svg:x="3.81cm" svg:y="1.238cm">
          <text:p text:style-name="P2"><text:span text:style-name="T1">This mont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12" draw:text-style-name="P10" draw:layer="layout" svg:width="14.729cm" svg:height="7.351cm" svg:x="2.8cm" svg:y="5.249cm">
          <text:p text:style-name="P9"><text:span text:style-name="T4">“</text:span><text:span text:style-name="T4">Intro to WebRTC” </text:span></text:p>
          <text:p text:style-name="P9"><text:span text:style-name="T2"/></text:p>
          <text:p text:style-name="P9"><text:span text:style-name="T2">Mark Goodwin</text:span></text:p>
          <text:p text:style-name="P9"><text:span text:style-name="T2"/></text:p>
          <text:p text:style-name="P9"><text:span text:style-name="T4">“</text:span><text:span text:style-name="T4">WebRTC workshop” </text:span></text:p>
          <text:p text:style-name="P9"><text:span text:style-name="T2">Mark Goodwin + robo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.4cm" svg:height="2.4cm" svg:x="1.207cm" svg:y="1.238cm">
          <draw:image xlink:href="Pictures/10000201000000F0000000F0D525F7BB8518D329.png" xlink:type="simple" xlink:show="embed" xlink:actuate="onLoad">
            <text:p/>
          </draw:image>
        </draw:frame>
        <draw:frame draw:style-name="gr6" draw:text-style-name="P7" draw:layer="layout" svg:width="4.4cm" svg:height="0.962cm" svg:x="21.6cm" svg:y="0.8cm">
          <draw:text-box>
            <text:p>nottsjs.org</text:p>
          </draw:text-box>
        </draw:frame>
        <draw:frame draw:style-name="gr13" draw:text-style-name="P6" draw:layer="layout" svg:width="1.849cm" svg:height="1.849cm" svg:x="20.8cm" svg:y="9.2cm">
          <draw:image xlink:href="Pictures/1000020100000078000000786ACA4C02B9501C96.png" xlink:type="simple" xlink:show="embed" xlink:actuate="onLoad">
            <text:p/>
          </draw:image>
        </draw:frame>
        <draw:frame draw:style-name="gr13" draw:text-style-name="P6" draw:layer="layout" svg:width="2.119cm" svg:height="2.119cm" svg:x="17.529cm" svg:y="9.081cm">
          <draw:image xlink:href="Pictures/100002010000006000000060DB73C5E596D2A4BF.png" xlink:type="simple" xlink:show="embed" xlink:actuate="onLoad">
            <text:p/>
          </draw:image>
        </draw:frame>
        <draw:frame draw:style-name="gr13" draw:text-style-name="P6" draw:layer="layout" svg:width="2.119cm" svg:height="2.119cm" svg:x="17.481cm" svg:y="5.6cm">
          <draw:image xlink:href="Pictures/100002010000006000000060DB73C5E596D2A4BF.png" xlink:type="simple" xlink:show="embed" xlink:actuate="onLoad">
            <text:p/>
          </draw:image>
        </draw:frame>
        <draw:frame draw:style-name="gr11" draw:text-style-name="P7" draw:layer="layout" svg:width="19.4cm" svg:height="2.384cm" svg:x="0cm" svg:y="12cm">
          <draw:text-box>
            <text:p>Twitter: @nottsjs #nottsjs #JavaScript</text:p>
            <text:p>Gitter: nottsjs/discuss</text:p>
            <text:p>WiFi: JH Guest Network / weloveguests112015</text:p>
          </draw:text-box>
        </draw:frame>
        <presentation:notes draw:style-name="dp2">
          <draw:page-thumbnail draw:name="Shape 68" draw:style-name="gr7" draw:layer="layout" svg:width="16.932cm" svg:height="9.524cm" svg:x="1.059cm" svg:y="1.905cm" draw:page-number="4" presentation:class="page"/>
          <draw:frame draw:name="Shape 69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 presentation:presentation-page-layout-name="AL1T0">
        <office:forms form:automatic-focus="false" form:apply-design-mode="false"/>
        <draw:frame draw:name="Shape 88" draw:style-name="gr1" draw:text-style-name="P1" draw:layer="layout" svg:width="2.437cm" svg:height="2.437cm" svg:x="1.207cm" svg:y="1.238cm">
          <draw:image xlink:href="Pictures/10000000000000C8000000C8962FD9C3CEF988CC.png" xlink:type="simple" xlink:show="embed" xlink:actuate="onLoad">
            <text:p/>
          </draw:image>
        </draw:frame>
        <draw:custom-shape draw:name="Shape 89" draw:style-name="gr14" draw:text-style-name="P3" draw:layer="layout" svg:width="20.39cm" svg:height="2.437cm" svg:x="3.81cm" svg:y="1.238cm">
          <text:p text:style-name="P2"><text:span text:style-name="T1">Intro to WebR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1" draw:layer="layout" svg:width="9.8cm" svg:height="3.095cm" svg:x="10.8cm" svg:y="6.427cm">
          <draw:text-box>
            <text:p><text:span text:style-name="T5">Mark </text:span><text:span text:style-name="T5">Good</text:span><text:span text:style-name="T5">win</text:span><text:span text:style-name="T5"><text:line-break/></text:span><text:span text:style-name="T5">@mr_</text:span><text:span text:style-name="T5">goodw</text:span><text:span text:style-name="T5">in</text:span></text:p>
            <text:p><text:span text:style-name="T5">~7 – </text:span><text:span text:style-name="T5">7:30p</text:span><text:span text:style-name="T5">m</text:span></text:p>
          </draw:text-box>
        </draw:frame>
        <draw:frame draw:style-name="gr4" draw:text-style-name="P5" draw:layer="layout" svg:width="2.4cm" svg:height="2.4cm" svg:x="1.207cm" svg:y="1.238cm">
          <draw:image xlink:href="Pictures/10000201000000F0000000F0D525F7BB8518D329.png" xlink:type="simple" xlink:show="embed" xlink:actuate="onLoad">
            <text:p/>
          </draw:image>
        </draw:frame>
        <draw:frame draw:style-name="gr11" draw:text-style-name="P7" draw:layer="layout" svg:width="19.4cm" svg:height="2.384cm" svg:x="1.4cm" svg:y="11.216cm">
          <draw:text-box>
            <text:p>Twitter: @nottsjs #nottsjs #JavaScript</text:p>
            <text:p>Gitter: nottsjs/discuss</text:p>
            <text:p>WiFi: JH Guest Network / weloveguests112015</text:p>
          </draw:text-box>
        </draw:frame>
        <draw:frame draw:style-name="gr6" draw:text-style-name="P7" draw:layer="layout" svg:width="4.4cm" svg:height="0.962cm" svg:x="21.6cm" svg:y="0.8cm">
          <draw:text-box>
            <text:p>nottsjs.org</text:p>
          </draw:text-box>
        </draw:frame>
        <draw:frame draw:style-name="gr13" draw:text-style-name="P6" draw:layer="layout" svg:width="5.532cm" svg:height="5.2cm" svg:x="1.8cm" svg:y="5cm">
          <draw:image xlink:href="Pictures/1000000000000200000002009FD4E741CB23A672.jpg" xlink:type="simple" xlink:show="embed" xlink:actuate="onLoad">
            <text:p/>
          </draw:image>
        </draw:frame>
        <presentation:notes draw:style-name="dp2">
          <draw:page-thumbnail draw:name="Shape 85" draw:style-name="gr7" draw:layer="layout" svg:width="16.932cm" svg:height="9.524cm" svg:x="1.059cm" svg:y="1.905cm" draw:page-number="5" presentation:class="page"/>
          <draw:frame draw:name="Shape 86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slide" presentation:presentation-page-layout-name="AL1T0">
        <office:forms form:automatic-focus="false" form:apply-design-mode="false"/>
        <draw:frame draw:name="Shape 88" draw:style-name="gr1" draw:text-style-name="P1" draw:layer="layout" svg:width="2.437cm" svg:height="2.437cm" svg:x="1.207cm" svg:y="1.238cm">
          <draw:image xlink:href="Pictures/10000000000000C8000000C8962FD9C3CEF988CC.png" xlink:type="simple" xlink:show="embed" xlink:actuate="onLoad">
            <text:p/>
          </draw:image>
        </draw:frame>
        <draw:custom-shape draw:name="Shape 89" draw:style-name="gr16" draw:text-style-name="P3" draw:layer="layout" svg:width="20.39cm" svg:height="2.437cm" svg:x="3.81cm" svg:y="1.238cm">
          <text:p text:style-name="P2"><text:span text:style-name="T1">Pizza &amp; Drink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.4cm" svg:height="2.4cm" svg:x="1.207cm" svg:y="1.238cm">
          <draw:image xlink:href="Pictures/10000201000000F0000000F0D525F7BB8518D329.png" xlink:type="simple" xlink:show="embed" xlink:actuate="onLoad">
            <text:p/>
          </draw:image>
        </draw:frame>
        <draw:frame draw:style-name="gr11" draw:text-style-name="P7" draw:layer="layout" svg:width="19.4cm" svg:height="2.384cm" svg:x="1.4cm" svg:y="11.216cm">
          <draw:text-box>
            <text:p>Twitter: @nottsjs #nottsjs #JavaScript</text:p>
            <text:p>Gitter: nottsjs/discuss</text:p>
            <text:p>WiFi: JH Guest Network / weloveguests112015</text:p>
          </draw:text-box>
        </draw:frame>
        <draw:frame draw:style-name="gr6" draw:text-style-name="P7" draw:layer="layout" svg:width="5.6cm" svg:height="0.962cm" svg:x="3.91cm" svg:y="3.2cm">
          <draw:text-box>
            <text:p><text:span text:style-name="T5">Resu</text:span><text:span text:style-name="T5">me at </text:span><text:span text:style-name="T5">~8pm</text:span></text:p>
          </draw:text-box>
        </draw:frame>
        <draw:frame draw:style-name="gr6" draw:text-style-name="P7" draw:layer="layout" svg:width="4.4cm" svg:height="0.962cm" svg:x="21.6cm" svg:y="0.8cm">
          <draw:text-box>
            <text:p>nottsjs.org</text:p>
          </draw:text-box>
        </draw:frame>
        <presentation:notes draw:style-name="dp2">
          <draw:page-thumbnail draw:name="Shape 85" draw:style-name="gr7" draw:layer="layout" svg:width="16.932cm" svg:height="9.524cm" svg:x="1.059cm" svg:y="1.905cm" draw:page-number="6" presentation:class="page"/>
          <draw:frame draw:name="Shape 86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slide" presentation:presentation-page-layout-name="AL1T0">
        <office:forms form:automatic-focus="false" form:apply-design-mode="false"/>
        <draw:frame draw:name="Shape 80" draw:style-name="gr1" draw:text-style-name="P1" draw:layer="layout" svg:width="2.437cm" svg:height="2.437cm" svg:x="1.207cm" svg:y="1.238cm">
          <draw:image xlink:href="Pictures/10000000000000C8000000C8962FD9C3CEF988CC.png" xlink:type="simple" xlink:show="embed" xlink:actuate="onLoad">
            <text:p/>
          </draw:image>
        </draw:frame>
        <draw:custom-shape draw:name="Shape 81" draw:style-name="gr17" draw:text-style-name="P3" draw:layer="layout" svg:width="20.99cm" svg:height="2.437cm" svg:x="3.81cm" svg:y="1.238cm">
          <text:p text:style-name="P2"><text:span text:style-name="T1">WebRTC worksh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5.8cm" svg:height="2.384cm" svg:x="1cm" svg:y="8.416cm">
          <draw:text-box>
            <text:p>Mark Goodwin<text:line-break/>@mr_goodwin</text:p>
          </draw:text-box>
        </draw:frame>
        <draw:frame draw:style-name="gr4" draw:text-style-name="P5" draw:layer="layout" svg:width="2.4cm" svg:height="2.4cm" svg:x="1.207cm" svg:y="1.238cm">
          <draw:image xlink:href="Pictures/10000201000000F0000000F0D525F7BB8518D329.png" xlink:type="simple" xlink:show="embed" xlink:actuate="onLoad">
            <text:p/>
          </draw:image>
        </draw:frame>
        <draw:frame draw:style-name="gr6" draw:text-style-name="P7" draw:layer="layout" svg:width="5.6cm" svg:height="0.962cm" svg:x="10cm" svg:y="3.238cm">
          <draw:text-box>
            <text:p><text:span text:style-name="T5">~8 - </text:span><text:span text:style-name="T5">8:30p</text:span><text:span text:style-name="T5">m</text:span></text:p>
          </draw:text-box>
        </draw:frame>
        <draw:frame draw:style-name="gr11" draw:text-style-name="P7" draw:layer="layout" svg:width="19.4cm" svg:height="2.384cm" svg:x="1.4cm" svg:y="11.216cm">
          <draw:text-box>
            <text:p>Twitter: @nottsjs #nottsjs #JavaScript</text:p>
            <text:p>Gitter: nottsjs/discuss</text:p>
            <text:p>WiFi: JH Guest Network / weloveguests112015</text:p>
          </draw:text-box>
        </draw:frame>
        <draw:frame draw:style-name="gr6" draw:text-style-name="P7" draw:layer="layout" svg:width="4.4cm" svg:height="0.962cm" svg:x="21.6cm" svg:y="0.8cm">
          <draw:text-box>
            <text:p>nottsjs.org</text:p>
          </draw:text-box>
        </draw:frame>
        <draw:frame draw:style-name="gr13" draw:text-style-name="P6" draw:layer="layout" svg:width="4.713cm" svg:height="4.713cm" svg:x="1.2cm" svg:y="3.8cm">
          <draw:image xlink:href="Pictures/1000000000000200000002009FD4E741CB23A672.jpg" xlink:type="simple" xlink:show="embed" xlink:actuate="onLoad">
            <text:p/>
          </draw:image>
        </draw:frame>
        <presentation:notes draw:style-name="dp2">
          <draw:page-thumbnail draw:name="Shape 77" draw:style-name="gr7" draw:layer="layout" svg:width="16.932cm" svg:height="9.524cm" svg:x="1.059cm" svg:y="1.905cm" draw:page-number="7" presentation:class="page"/>
          <draw:frame draw:name="Shape 78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slide" presentation:presentation-page-layout-name="AL1T0">
        <office:forms form:automatic-focus="false" form:apply-design-mode="false"/>
        <draw:frame draw:name="Shape 105" draw:style-name="gr1" draw:text-style-name="P1" draw:layer="layout" svg:width="4.471cm" svg:height="4.471cm" svg:x="1.207cm" svg:y="1.238cm">
          <draw:image xlink:href="Pictures/10000000000000C8000000C8962FD9C3CEF988CC.png" xlink:type="simple" xlink:show="embed" xlink:actuate="onLoad">
            <text:p/>
          </draw:image>
        </draw:frame>
        <draw:custom-shape draw:name="Shape 106" draw:style-name="gr19" draw:text-style-name="P3" draw:layer="layout" svg:width="17.537cm" svg:height="1.151cm" svg:x="6.479cm" svg:y="3.13cm">
          <text:p text:style-name="P2"><text:span text:style-name="T1">Next time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7" draw:style-name="gr20" draw:text-style-name="P3" draw:layer="layout" svg:width="17.537cm" svg:height="1.151cm" svg:x="6.479cm" svg:y="4.458cm">
          <text:p text:style-name="P2"><text:span text:style-name="T2">9th August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4.48cm" svg:height="4.48cm" svg:x="1.198cm" svg:y="1.229cm">
          <draw:image xlink:href="Pictures/10000201000000F0000000F0D525F7BB8518D329.png" xlink:type="simple" xlink:show="embed" xlink:actuate="onLoad">
            <text:p/>
          </draw:image>
        </draw:frame>
        <draw:frame draw:style-name="gr11" draw:text-style-name="P7" draw:layer="layout" svg:width="19.4cm" svg:height="1.673cm" svg:x="1.4cm" svg:y="11.216cm">
          <draw:text-box>
            <text:p>Twitter: @nottsjs #nottsjs #JavaScript</text:p>
            <text:p>Gitter: nottsjs/discuss</text:p>
          </draw:text-box>
        </draw:frame>
        <draw:custom-shape draw:name="Shape 106" draw:style-name="gr21" draw:text-style-name="P3" draw:layer="layout" svg:width="17.537cm" svg:height="1.151cm" svg:x="1.263cm" svg:y="6.249cm">
          <text:p text:style-name="P2"><text:span text:style-name="T1">Social dri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4.4cm" svg:height="0.962cm" svg:x="21.6cm" svg:y="0.8cm">
          <draw:text-box>
            <text:p>nottsjs.org</text:p>
          </draw:text-box>
        </draw:frame>
        <draw:frame draw:style-name="gr11" draw:text-style-name="P7" draw:layer="layout" svg:width="15cm" svg:height="1.673cm" svg:x="1.4cm" svg:y="8.3cm">
          <draw:text-box>
            <text:p>Round the corner to the Keans Head</text:p>
          </draw:text-box>
        </draw:frame>
        <draw:frame draw:style-name="gr4" draw:text-style-name="P5" draw:layer="layout" svg:width="5.621cm" svg:height="4.175cm" svg:x="12.6cm" svg:y="6.4cm">
          <draw:image xlink:href="Pictures/10000201000001C70000015252CD3CEB618A673B.png" xlink:type="simple" xlink:show="embed" xlink:actuate="onLoad">
            <text:p/>
          </draw:image>
        </draw:frame>
        <draw:frame draw:style-name="gr4" draw:text-style-name="P5" draw:layer="layout" svg:width="4.2cm" svg:height="4.2cm" svg:x="18.475cm" svg:y="6.4cm">
          <draw:image xlink:href="Pictures/10000201000001F4000001F4C4454CB918A5A3C8.png" xlink:type="simple" xlink:show="embed" xlink:actuate="onLoad">
            <text:p/>
          </draw:image>
        </draw:frame>
        <presentation:notes draw:style-name="dp2">
          <draw:page-thumbnail draw:name="Shape 101" draw:style-name="gr7" draw:layer="layout" svg:width="16.932cm" svg:height="9.524cm" svg:x="1.059cm" svg:y="1.905cm" draw:page-number="8" presentation:class="page"/>
          <draw:frame draw:name="Shape 102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7-12T10:33:45.309591677</dc:date>
    <meta:editing-duration>PT1H41M1S</meta:editing-duration>
    <meta:editing-cycles>7</meta:editing-cycles>
    <meta:generator>LibreOffice/5.1.4.2$Linux_X86_64 LibreOffice_project/10m0$Build-2</meta:generator>
    <meta:document-statistic meta:object-count="98"/>
  </office:meta>
</office:document-meta>
</file>